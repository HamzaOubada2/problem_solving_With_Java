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Array problems <text:s text:c="4"/>⭐⭐⭐</text:p>
      <text:p text:style-name="Standard">2. String problems <text:s text:c="3"/>⭐⭐⭐</text:p>
      <text:p text:style-name="Standard">3. HashMap problems <text:s text:c="2"/>⭐⭐⭐</text:p>
      <text:p text:style-name="Standard">4. Stack problems <text:s text:c="4"/>⭐⭐</text:p>
      <text:p text:style-name="Standard">5. LinkedList problems ⭐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0T23:11:17.992334783</meta:creation-date>
    <dc:date>2026-04-10T23:11:43.703920805</dc:date>
    <meta:editing-duration>PT26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1" meta:paragraph-count="5" meta:word-count="20" meta:character-count="123" meta:non-whitespace-character-count="95"/>
  </office:meta>
</office:document-meta>
</file>